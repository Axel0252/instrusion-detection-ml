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B800000708979491E5.png" manifest:media-type="image/png"/>
  <manifest:file-entry manifest:full-path="Pictures/1000000100000708000005DC0BAEE42A.png" manifest:media-type="image/png"/>
  <manifest:file-entry manifest:full-path="Pictures/1000000100000317000000E3D23A87A3.png" manifest:media-type="image/png"/>
  <manifest:file-entry manifest:full-path="Pictures/100000010000010300000175870BF1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start" style:justify-single-word="false"/>
      <style:text-properties fo:color="#8d1d75" loext:opacity="100%" style:font-name="Liberation Sans" officeooo:rsid="0008eec9" officeooo:paragraph-rsid="0008eec9"/>
    </style:style>
    <style:style style:name="P2" style:family="paragraph" style:parent-style-name="Text_20_body">
      <style:paragraph-properties fo:text-align="start" style:justify-single-word="false"/>
      <style:text-properties officeooo:paragraph-rsid="00093236"/>
    </style:style>
    <style:style style:name="P3" style:family="paragraph" style:parent-style-name="Text_20_body">
      <style:paragraph-properties fo:text-align="start" style:justify-single-word="false"/>
      <style:text-properties style:font-name="Noto Sans" officeooo:rsid="0026aae5" officeooo:paragraph-rsid="0026aae5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Noto Sans" officeooo:rsid="0026aae5" officeooo:paragraph-rsid="0026aae5"/>
    </style:style>
    <style:style style:name="P5" style:family="paragraph" style:parent-style-name="Text_20_body">
      <style:text-properties style:font-name="Noto Sans" officeooo:rsid="00093236" officeooo:paragraph-rsid="00093236"/>
    </style:style>
    <style:style style:name="P6" style:family="paragraph" style:parent-style-name="Text_20_body">
      <style:text-properties style:font-name="Noto Sans" officeooo:rsid="00098468" officeooo:paragraph-rsid="00098468"/>
    </style:style>
    <style:style style:name="P7" style:family="paragraph" style:parent-style-name="Text_20_body" style:list-style-name="L2" style:master-page-name="">
      <loext:graphic-properties draw:fill="none"/>
      <style:paragraph-properties fo:margin-left="0in" fo:margin-right="0in" fo:margin-top="0in" fo:margin-bottom="0in" style:contextual-spacing="false" fo:line-height="115%" fo:text-indent="-0.1866in" style:auto-text-indent="false" style:page-number="auto" fo:background-color="transparent"/>
      <style:text-properties style:font-name="Noto Sans" officeooo:rsid="00098468"/>
    </style:style>
    <style:style style:name="P8" style:family="paragraph" style:parent-style-name="Text_20_body" style:list-style-name="L2">
      <loext:graphic-properties draw:fill="none"/>
      <style:paragraph-properties fo:margin-left="0in" fo:margin-right="0in" fo:margin-top="0in" fo:margin-bottom="0in" style:contextual-spacing="false" fo:line-height="115%" fo:text-indent="-0.1866in" style:auto-text-indent="false" fo:background-color="transparent"/>
      <style:text-properties style:font-name="Noto Sans" officeooo:rsid="00098468"/>
    </style:style>
    <style:style style:name="P9" style:family="paragraph" style:parent-style-name="Text_20_body" style:list-style-name="L3">
      <loext:graphic-properties draw:fill="none"/>
      <style:paragraph-properties fo:margin-left="0in" fo:margin-right="0in" fo:margin-top="0in" fo:margin-bottom="0in" style:contextual-spacing="false" fo:line-height="115%" fo:text-indent="-0.1866in" style:auto-text-indent="false" fo:background-color="transparent"/>
      <style:text-properties style:font-name="Noto Sans" officeooo:rsid="00098468"/>
    </style:style>
    <style:style style:name="P10" style:family="paragraph" style:parent-style-name="Text_20_body" style:list-style-name="L4">
      <loext:graphic-properties draw:fill="none"/>
      <style:paragraph-properties fo:margin-left="0in" fo:margin-right="0in" fo:margin-top="0in" fo:margin-bottom="0in" style:contextual-spacing="false" fo:line-height="115%" fo:text-indent="-0.1866in" style:auto-text-indent="false" fo:background-color="transparent"/>
      <style:text-properties style:font-name="Noto Sans" officeooo:rsid="00098468" officeooo:paragraph-rsid="000fd137"/>
    </style:style>
    <style:style style:name="P11" style:family="paragraph" style:parent-style-name="Footnote">
      <style:text-properties officeooo:rsid="000cef4d" officeooo:paragraph-rsid="000cef4d"/>
    </style:style>
    <style:style style:name="P12" style:family="paragraph" style:parent-style-name="Text_20_body" style:list-style-name="L5">
      <loext:graphic-properties draw:fill="none"/>
      <style:paragraph-properties fo:margin-left="0in" fo:margin-right="0in" fo:margin-top="0in" fo:margin-bottom="0in" style:contextual-spacing="false" fo:line-height="115%" fo:text-indent="-0.1866in" style:auto-text-indent="false" fo:background-color="transparent"/>
      <style:text-properties style:font-name="Noto Sans" officeooo:rsid="00098468"/>
    </style:style>
    <style:style style:name="P13" style:family="paragraph" style:parent-style-name="Text_20_body" style:list-style-name="L6">
      <loext:graphic-properties draw:fill="none"/>
      <style:paragraph-properties fo:margin-left="0in" fo:margin-right="0in" fo:line-height="115%" fo:text-indent="-0.1866in" style:auto-text-indent="false" fo:background-color="transparent"/>
      <style:text-properties style:font-name="Noto Sans" officeooo:rsid="00098468"/>
    </style:style>
    <style:style style:name="P14" style:family="paragraph" style:parent-style-name="Text_20_body">
      <style:text-properties style:font-name="Noto Sans" officeooo:rsid="00098468" officeooo:paragraph-rsid="00381370"/>
    </style:style>
    <style:style style:name="P15" style:family="paragraph" style:parent-style-name="Text_20_body">
      <style:text-properties style:font-name="Noto Sans" fo:font-weight="normal" officeooo:rsid="000fd137" officeooo:paragraph-rsid="000fd137" style:font-weight-asian="normal" style:font-weight-complex="normal"/>
    </style:style>
    <style:style style:name="P16" style:family="paragraph" style:parent-style-name="Heading_20_3">
      <style:text-properties officeooo:rsid="000fd137" officeooo:paragraph-rsid="000fd137"/>
    </style:style>
    <style:style style:name="P17" style:family="paragraph" style:parent-style-name="Text_20_body">
      <style:text-properties style:font-name="Noto Sans" officeooo:rsid="000fd137" officeooo:paragraph-rsid="000fd137"/>
    </style:style>
    <style:style style:name="P18" style:family="paragraph" style:parent-style-name="Text_20_body">
      <style:text-properties style:font-name="Noto Sans" officeooo:rsid="000fd137" officeooo:paragraph-rsid="00126f93"/>
    </style:style>
    <style:style style:name="P19" style:family="paragraph" style:parent-style-name="Text_20_body">
      <style:text-properties style:font-name="Noto Sans" officeooo:rsid="00133fa3" officeooo:paragraph-rsid="00133fa3"/>
    </style:style>
    <style:style style:name="P20" style:family="paragraph" style:parent-style-name="Heading_20_3">
      <style:text-properties officeooo:rsid="00133fa3" officeooo:paragraph-rsid="00133fa3"/>
    </style:style>
    <style:style style:name="P21" style:family="paragraph" style:parent-style-name="Text_20_body">
      <style:text-properties style:font-name="Noto Sans" officeooo:rsid="00126f93" officeooo:paragraph-rsid="00126f93"/>
    </style:style>
    <style:style style:name="P22" style:family="paragraph" style:parent-style-name="Text_20_body">
      <style:text-properties style:font-name="Noto Sans" officeooo:rsid="002726a4" officeooo:paragraph-rsid="002726a4"/>
    </style:style>
    <style:style style:name="P23" style:family="paragraph" style:parent-style-name="Heading_20_3">
      <style:text-properties officeooo:rsid="001508a4" officeooo:paragraph-rsid="001508a4"/>
    </style:style>
    <style:style style:name="P24" style:family="paragraph" style:parent-style-name="Text_20_body">
      <style:text-properties style:font-name="Noto Sans" fo:font-style="normal" fo:font-weight="normal" officeooo:rsid="0026aae5" officeooo:paragraph-rsid="0026aae5" style:font-style-asian="normal" style:font-weight-asian="normal" style:font-style-complex="normal" style:font-weight-complex="normal"/>
    </style:style>
    <style:style style:name="P25" style:family="paragraph" style:parent-style-name="Heading_20_2">
      <style:text-properties officeooo:rsid="00162854" officeooo:paragraph-rsid="00162854"/>
    </style:style>
    <style:style style:name="P26" style:family="paragraph" style:parent-style-name="Text_20_body">
      <style:text-properties style:font-name="Noto Sans" officeooo:rsid="00162854" officeooo:paragraph-rsid="00162854"/>
    </style:style>
    <style:style style:name="P27" style:family="paragraph" style:parent-style-name="Text_20_body">
      <style:text-properties style:font-name="Noto Sans" fo:font-style="normal" officeooo:rsid="00162854" officeooo:paragraph-rsid="00162854" style:font-style-asian="normal" style:font-style-complex="normal"/>
    </style:style>
    <style:style style:name="P28" style:family="paragraph" style:parent-style-name="Text_20_body">
      <style:text-properties style:font-name="Noto Sans" fo:font-style="normal" officeooo:rsid="0017c209" officeooo:paragraph-rsid="0017c209" style:font-style-asian="normal" style:font-style-complex="normal"/>
    </style:style>
    <style:style style:name="P29" style:family="paragraph" style:parent-style-name="Text_20_body">
      <style:text-properties style:font-name="Noto Sans" fo:font-style="normal" officeooo:rsid="002bfcd7" officeooo:paragraph-rsid="002bfcd7" style:font-style-asian="normal" style:font-style-complex="normal"/>
    </style:style>
    <style:style style:name="P30" style:family="paragraph" style:parent-style-name="Text_20_body" style:list-style-name="L7">
      <style:text-properties style:font-name="Noto Sans" fo:font-style="normal" officeooo:rsid="002bfcd7" officeooo:paragraph-rsid="002dc7fb" style:font-style-asian="normal" style:font-style-complex="normal"/>
    </style:style>
    <style:style style:name="P31" style:family="paragraph" style:parent-style-name="Text_20_body">
      <style:text-properties style:font-name="Noto Sans" fo:font-style="normal" officeooo:rsid="0030375f" officeooo:paragraph-rsid="0030375f" style:font-style-asian="normal" style:font-style-complex="normal"/>
    </style:style>
    <style:style style:name="P32" style:family="paragraph" style:parent-style-name="Heading_20_2">
      <style:text-properties officeooo:rsid="0019f9b0" officeooo:paragraph-rsid="0019f9b0"/>
    </style:style>
    <style:style style:name="P33" style:family="paragraph" style:parent-style-name="Text_20_body">
      <style:text-properties style:font-name="Noto Sans" officeooo:rsid="0019f9b0" officeooo:paragraph-rsid="001b8525"/>
    </style:style>
    <style:style style:name="P34" style:family="paragraph" style:parent-style-name="Heading_20_2">
      <style:text-properties officeooo:rsid="001cc916" officeooo:paragraph-rsid="001cc916"/>
    </style:style>
    <style:style style:name="P35" style:family="paragraph" style:parent-style-name="Text_20_body">
      <style:text-properties style:font-name="Noto Sans" fo:font-style="normal" officeooo:rsid="001cc916" officeooo:paragraph-rsid="001cc916" style:font-style-asian="normal" style:font-style-complex="normal"/>
    </style:style>
    <style:style style:name="P36" style:family="paragraph" style:parent-style-name="Text_20_body">
      <style:text-properties style:font-name="Noto Sans" fo:font-style="normal" officeooo:rsid="002068ca" officeooo:paragraph-rsid="002068ca" style:font-style-asian="normal" style:font-style-complex="normal"/>
    </style:style>
    <style:style style:name="P37" style:family="paragraph" style:parent-style-name="Heading_20_2">
      <style:paragraph-properties fo:margin-top="0in" fo:margin-bottom="0.0972in" style:contextual-spacing="false" fo:line-height="115%"/>
      <style:text-properties style:font-name="Noto Sans" officeooo:rsid="002068ca"/>
    </style:style>
    <style:style style:name="P38" style:family="paragraph" style:parent-style-name="Heading_20_2" style:list-style-name="L8">
      <style:paragraph-properties fo:margin-top="0in" fo:margin-bottom="0.0972in" style:contextual-spacing="false" fo:line-height="115%"/>
      <style:text-properties style:font-name="Noto Sans" officeooo:rsid="002068ca"/>
    </style:style>
    <style:style style:name="P39" style:family="paragraph" style:parent-style-name="Text_20_body" style:list-style-name="L8">
      <style:text-properties style:font-name="Noto Sans" officeooo:rsid="002068ca"/>
    </style:style>
    <style:style style:name="P40" style:family="paragraph" style:parent-style-name="Text_20_body" style:list-style-name="L8">
      <style:text-properties style:font-name="Noto Sans" officeooo:rsid="002068ca" officeooo:paragraph-rsid="003a0ccf"/>
    </style:style>
    <style:style style:name="P41" style:family="paragraph" style:parent-style-name="Heading_20_2" style:list-style-name="L8">
      <style:paragraph-properties fo:margin-top="0in" fo:margin-bottom="0.0972in" style:contextual-spacing="false" fo:line-height="115%"/>
      <style:text-properties style:font-name="Noto Sans" officeooo:rsid="002068ca" officeooo:paragraph-rsid="003a0ccf"/>
    </style:style>
    <style:style style:name="P42" style:family="paragraph" style:parent-style-name="Text_20_body">
      <style:text-properties style:font-name="Noto Sans" officeooo:rsid="002068ca"/>
    </style:style>
    <style:style style:name="P43" style:family="paragraph" style:parent-style-name="Text_20_body" style:list-style-name="L9">
      <style:paragraph-properties fo:margin-top="0in" fo:margin-bottom="0in" style:contextual-spacing="false"/>
      <style:text-properties style:font-name="Noto Sans" officeooo:rsid="002068ca"/>
    </style:style>
    <style:style style:name="P44" style:family="paragraph" style:parent-style-name="Text_20_body" style:list-style-name="L9">
      <style:text-properties style:font-name="Noto Sans" officeooo:rsid="002068ca"/>
    </style:style>
    <style:style style:name="T1" style:family="text">
      <style:text-properties style:font-name="Noto Sans" officeooo:rsid="0008eec9"/>
    </style:style>
    <style:style style:name="T2" style:family="text">
      <style:text-properties style:font-name="Noto Sans" officeooo:rsid="000932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8468"/>
    </style:style>
    <style:style style:name="T5" style:family="text">
      <style:text-properties officeooo:rsid="000fd137"/>
    </style:style>
    <style:style style:name="T6" style:family="text">
      <style:text-properties officeooo:rsid="00331994"/>
    </style:style>
    <style:style style:name="T7" style:family="text">
      <style:text-properties officeooo:rsid="000cdd1f"/>
    </style:style>
    <style:style style:name="T8" style:family="text">
      <style:text-properties fo:font-weight="normal" officeooo:rsid="00381370" style:font-weight-asian="normal" style:font-weight-complex="normal"/>
    </style:style>
    <style:style style:name="T9" style:family="text">
      <style:text-properties officeooo:rsid="00381370"/>
    </style:style>
    <style:style style:name="T10" style:family="text">
      <style:text-properties officeooo:rsid="00240a05"/>
    </style:style>
    <style:style style:name="T11" style:family="text">
      <style:text-properties officeooo:rsid="00133fa3"/>
    </style:style>
    <style:style style:name="T12" style:family="text">
      <style:text-properties officeooo:rsid="00119c80"/>
    </style:style>
    <style:style style:name="T13" style:family="text">
      <style:text-properties officeooo:rsid="00126f93"/>
    </style:style>
    <style:style style:name="T14" style:family="text">
      <style:text-properties officeooo:rsid="002543d2"/>
    </style:style>
    <style:style style:name="T15" style:family="text">
      <style:text-properties officeooo:rsid="00134393"/>
    </style:style>
    <style:style style:name="T16" style:family="text">
      <style:text-properties officeooo:rsid="0026aae5"/>
    </style:style>
    <style:style style:name="T17" style:family="text">
      <style:text-properties officeooo:rsid="00277fe4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30375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17c209"/>
    </style:style>
    <style:style style:name="T24" style:family="text">
      <style:text-properties officeooo:rsid="002bfcd7"/>
    </style:style>
    <style:style style:name="T25" style:family="text">
      <style:text-properties officeooo:rsid="002dc7fb"/>
    </style:style>
    <style:style style:name="T26" style:family="text">
      <style:text-properties officeooo:rsid="002a6c3c"/>
    </style:style>
    <style:style style:name="T27" style:family="text">
      <style:text-properties officeooo:rsid="002b694d"/>
    </style:style>
    <style:style style:name="T28" style:family="text">
      <style:text-properties officeooo:rsid="001b8525"/>
    </style:style>
    <style:style style:name="T29" style:family="text">
      <style:text-properties officeooo:rsid="0022d625"/>
    </style:style>
    <style:style style:name="T30" style:family="text">
      <style:text-properties officeooo:rsid="001d30a5"/>
    </style:style>
    <style:style style:name="T31" style:family="text">
      <style:text-properties officeooo:rsid="003a203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rocinio Tafuro</text:p>
      <text:p text:style-name="P2"><text:span text:style-name="T1">La prima parte del lavoro consiste nella creazione di un intelligenza artificiale, allenata tramite random forest con il </text:span><text:span text:style-name="T2">dataset CIC-IDS2018</text:span><text:span text:style-name="T2"><text:note text:id="ftn1" text:note-class="footnote"><text:note-citation>1</text:note-citation><text:note-body><text:p text:style-name="Footnote"><text:a xlink:type="simple" xlink:href="https://www.kaggle.com/datasets/solarmainframe/ids-intrusion-csv/data" text:style-name="Internet_20_link" text:visited-style-name="Visited_20_Internet_20_Link">https://www.kaggle.com/datasets/solarmainframe/ids-intrusion-csv/data</text:a></text:p></text:note-body></text:note></text:span><text:span text:style-name="T2">.</text:span></text:p>
      <text:p text:style-name="P3">Il progetto è diviso in due file:</text:p>
      <text:list text:style-name="L1">
        <text:list-item>
          <text:p text:style-name="P4"><text:span text:style-name="T3">train_model.py</text:span>: È il file che contiene tutta la logica per l’addestramento del modello e la valutazione delle metriche</text:p>
        </text:list-item>
        <text:list-item>
          <text:p text:style-name="P4"><text:span text:style-name="T3">misc.py</text:span>: Contiene varie funzioni utili alla costruzione di un dataset ed alla pulizia dei dati contenuti in esso</text:p>
        </text:list-item>
      </text:list>
      <text:h text:style-name="Heading_20_2" text:outline-level="2">Il dataset</text:h>
      <text:p text:style-name="P5">Il dataset è stato originariamente creato dall’Università del New Brunswick per analizzare attacchi DdoS, <text:span text:style-name="T4">ed è il risultato della cattura del traffico rete di un IDS, per </text:span><text:span text:style-name="T5">una decina di giorni</text:span><text:span text:style-name="T4"> di marzo 2018</text:span>. Esso si compone di 80 colonne <text:span text:style-name="T6">per circa 8 milioni di righe.</text:span></text:p>
      <text:p text:style-name="P6">Tra le <text:span text:style-name="T5">colonne</text:span> più importanti troviamo:</text:p>
      <text:list text:style-name="L2">
        <text:list-item>
          <text:p text:style-name="P7">Dst Port (Destination port) </text:p>
        </text:list-item>
        <text:list-item>
          <text:p text:style-name="P8">Protocol </text:p>
        </text:list-item>
      </text:list>
      <text:list text:style-name="L3">
        <text:list-item>
          <text:p text:style-name="P9">Flow Duration</text:p>
        </text:list-item>
      </text:list>
      <text:list text:style-name="L4">
        <text:list-item>
          <text:p text:style-name="P10">Tot Fwd Pkts<text:span text:style-name="T7"><text:note text:id="ftn2" text:note-class="footnote"><text:note-citation>2</text:note-citation><text:note-body><text:p text:style-name="P11">Per Fwd Pkt si intendono pacchetti che viaggiano dal client al server, mentre i Bwd Pkt viaggiano dal server al client.</text:p></text:note-body></text:note></text:span> (Total forward packets) </text:p>
        </text:list-item>
      </text:list>
      <text:list text:style-name="L5">
        <text:list-item>
          <text:p text:style-name="P12">Tot Bwd Pkts (Total backward packets) </text:p>
        </text:list-item>
      </text:list>
      <text:list text:style-name="L6">
        <text:list-item>
          <text:p text:style-name="P13">Label</text:p>
        </text:list-item>
      </text:list>
      <text:p text:style-name="P6">Il traffico viene identificato come malevolo o benigno in base al valore contenuto nella colonna <text:span text:style-name="T3">Label, </text:span><text:span text:style-name="T8">che possono essere:</text:span></text:p>
      <text:p text:style-name="P14"><text:soft-page-break/><text:span text:style-name="T9"><text:s/></text:span><text:span text:style-name="T9"><draw:frame draw:style-name="fr1" draw:name="Image5" text:anchor-type="as-char" svg:width="2.6972in" svg:height="3.8846in" draw:z-index="4"><draw:image xlink:href="Pictures/100000010000010300000175870BF168.png" xlink:type="simple" xlink:show="embed" xlink:actuate="onLoad" draw:mime-type="image/png"/></draw:frame></text:span></text:p>
      <text:p text:style-name="P15">Inoltre, il dataset è diviso in molteplici file CSV, uno per ogni giorno di cattura dei pacchetti.</text:p>
      <text:h text:style-name="P16" text:outline-level="3">Pre-processing</text:h>
      <text:p text:style-name="P17">Data la grande mole di entries “<text:span text:style-name="T10">sporche”</text:span> presenti nel dataset, una prima fase di <text:span text:style-name="T11">pulizia</text:span> si è resa necessaria.</text:p>
      <text:p text:style-name="P18">Come primo step <text:span text:style-name="T11">per la </text:span>pulizia del dataset, <text:span text:style-name="T11">sono state rimosse</text:span> le entries che presentavano campi non validi (con valori NaN o infiniti) <text:span text:style-name="T12">e </text:span><text:span text:style-name="T10">si è iniziata </text:span><text:span text:style-name="T13">la</text:span><text:span text:style-name="T12"> prima fase della feature importance, </text:span><text:span text:style-name="T13">che è stata svolta “manualmente”, </text:span><text:span text:style-name="T10">rimuovendo a priori l</text:span><text:span text:style-name="T14">a colonna</text:span><text:span text:style-name="T10"> </text:span><text:span text:style-name="T13">“Timestamp” dal dataset, poiché considerat</text:span><text:span text:style-name="T14">a</text:span><text:span text:style-name="T13"> inutil</text:span><text:span text:style-name="T14">e</text:span>.</text:p>
      <text:p text:style-name="P19">Va, inoltre, specificato che, data la grandezza del dataset, la parte del programma che gestisce la pulizia e la costruzione del dataset stesso, lo divide in piccoli chunk e lavora su di essi, per alleggerire il carico alla memoria.</text:p>
      <text:h text:style-name="P20" text:outline-level="3">Costruzione del dataset</text:h>
      <text:p text:style-name="P19">La fase di costruzione del dataset ha previsto l’unione dei vari file del dataset in un unico grande file CSV.</text:p>
      <text:p text:style-name="P21"><text:span text:style-name="T15">In un’</text:span>ulteriore fase del<text:span text:style-name="T15">la costruzione è stato </text:span><text:span text:style-name="T11">effettuato </text:span>un downsampling de<text:span text:style-name="T11">i campioni </text:span><text:span text:style-name="T15">benigni selezionandone un sottoinsieme, <text:s/>in modo che </text:span><text:span text:style-name="T10">i</text:span><text:span text:style-name="T16">l numero di</text:span><text:span text:style-name="T10"> campioni benigni </text:span><text:span text:style-name="T16">sia uguale al numero</text:span><text:span text:style-name="T10"> campioni malevoli</text:span><text:span text:style-name="T15">. Questo perché il dataset presenta di per sé molti più campioni benigni che maligni, e questo porta ad un </text:span><text:soft-page-break/><text:span text:style-name="T15">peggioramento delle performance dell’IA quando deve rilevare le classi meno rappresentate.</text:span></text:p>
      <text:p text:style-name="P22">I valori possibili della colonna “Label” sono:</text:p>
      <text:p text:style-name="P22"><draw:frame draw:style-name="fr2" draw:name="Image2" text:anchor-type="as-char" svg:y="-3.4264in" svg:width="2.6972in" svg:height="3.8846in" draw:z-index="0"><draw:image xlink:href="Pictures/100000010000010300000175870BF168.png" xlink:type="simple" xlink:show="embed" xlink:actuate="onLoad" draw:mime-type="image/png"/></draw:frame></text:p>
      <text:p text:style-name="P22">Per semplicità, il valore “Benign” è stato trasformato in 0, mentre tutti i valori che non sono “Benign” sono stati trasformati in 1 <text:span text:style-name="T17">(come visto nella funzione clean_dataset)</text:span>.</text:p>
      <text:h text:style-name="P23" text:outline-level="3">Funzione ‘<text:span text:style-name="T18">load_and_prepare’</text:span><text:span text:style-name="T19">:</text:span></text:h>
      <text:p text:style-name="P24">Questa è la funzione che si occupa selezionare solo una parte dei campioni benigni, in modo che il suo numero sia uguale a quello dei campioni maligni (2.169.002 campioni per classe).</text:p>
      <text:h text:style-name="P25" text:outline-level="2"><text:span text:style-name="T20">Addestramento</text:span> del modello</text:h>
      <text:p text:style-name="P26">Il modello viene addestrato nella funzione ‘<text:span text:style-name="T21">train_model</text:span><text:span text:style-name="T22">’.</text:span></text:p>
      <text:p text:style-name="P27"><text:span text:style-name="T23">Lo </text:span>splitting train/test <text:span text:style-name="T23">è stato fatto prendendo in considerazione le scelte di altri programmatori (ad esempio </text:span><text:a xlink:type="simple" xlink:href="https://www.kaggle.com/code/azazurrehmanbutt/cicids-ids-2018-using-cnn" text:style-name="Internet_20_link" text:visited-style-name="Visited_20_Internet_20_Link"><text:span text:style-name="T23">questo</text:span></text:a><text:span text:style-name="T23">).</text:span></text:p>
      <text:p text:style-name="P28">Per quanto riguarda <text:span text:style-name="T24">la scelta</text:span> <text:span text:style-name="T24">de</text:span>gli iperparametri del modello, <text:span text:style-name="T24">sono state </text:span><text:span text:style-name="T25">utilizzate</text:span><text:span text:style-name="T24"> le funzioni </text:span><text:span text:style-name="T26">GridSearchCV </text:span><text:span text:style-name="T24">e RandomizedSearchCV </text:span><text:span text:style-name="T25">su un subset ridotto del dataset originale.</text:span></text:p>
      <text:p text:style-name="P29">La RandomizedSearchCV sembra aver dato i risultati migliori in un tempo minore (circa 30 minuti contro i 46 della GridSearchCV). <text:span text:style-name="T25">Gli iperparametri migliori sono quindi:</text:span></text:p>
      <text:list text:style-name="L7">
        <text:list-item>
          <text:p text:style-name="P30"><text:soft-page-break/>n_estimators: 300,</text:p>
        </text:list-item>
        <text:list-item>
          <text:p text:style-name="P30">min_samples_split: 5,</text:p>
        </text:list-item>
        <text:list-item>
          <text:p text:style-name="P30">min_samples_leaf: 1,</text:p>
        </text:list-item>
        <text:list-item>
          <text:p text:style-name="P30">max_depth: 20,</text:p>
        </text:list-item>
        <text:list-item>
          <text:p text:style-name="P30">criterion: entropy</text:p>
        </text:list-item>
      </text:list>
      <text:p text:style-name="P31">La top 10 delle combinazioni migliori è:</text:p>
      <text:p text:style-name="P31"><draw:frame draw:style-name="fr3" draw:name="Image3" text:anchor-type="char" svg:width="6.6929in" svg:height="1.9201in" draw:z-index="1"><draw:image xlink:href="Pictures/1000000100000317000000E3D23A87A3.png" xlink:type="simple" xlink:show="embed" xlink:actuate="onLoad" draw:mime-type="image/png"/></draw:frame></text:p>
      <text:h text:style-name="P32" text:outline-level="2">Valutazione del risultato</text:h>
      <text:p text:style-name="P33">Prima di stampare i risultati <text:span text:style-name="T27">sono stati</text:span><text:span text:style-name="T10"> eseguiti </text:span>vari esperimenti <text:span text:style-name="T28">sul threshold di decisione del modello </text:span>(funzione ‘<text:span text:style-name="T21">evaluate</text:span><text:span text:style-name="T22">’</text:span>)<text:span text:style-name="T28"> </text:span>per raggiungere un valore di recall accettabile.</text:p>
      <text:p text:style-name="P33"><text:soft-page-break/><draw:frame draw:style-name="fr4" draw:name="Image1" text:anchor-type="as-char" svg:width="6in" svg:height="5in" draw:z-index="2"><draw:image xlink:href="Pictures/1000000100000708000005DC0BAEE42A.png" xlink:type="simple" xlink:show="embed" xlink:actuate="onLoad" draw:mime-type="image/png"/></draw:frame></text:p>
      <text:h text:style-name="P34" text:outline-level="2">Funzione <text:span text:style-name="T18">‘feature_importance’</text:span><text:span text:style-name="T22">:</text:span></text:h>
      <text:p text:style-name="P35">La funzione <text:span text:style-name="T29">mostra</text:span> le dieci feature più importanti per il modello.</text:p>
      <text:p text:style-name="P35">Il risultato<text:span text:style-name="T30"> è:</text:span></text:p>
      <text:p text:style-name="P35"><text:soft-page-break/><draw:frame draw:style-name="fr5" draw:name="Image4" text:anchor-type="as-char" svg:width="6.6929in" svg:height="4.0154in" draw:z-index="3"><draw:image xlink:href="Pictures/1000000100000BB800000708979491E5.png" xlink:type="simple" xlink:show="embed" xlink:actuate="onLoad" draw:mime-type="image/png"/></draw:frame></text:p>
      <text:p text:style-name="P36">Questo <text:span text:style-name="T29">grafico motra le features </text:span>più importanti, <text:span text:style-name="T29">cioé quelle che il modello va ad utilizzare più spesso quando deve classificare un campione.</text:span></text:p>
      <text:h text:style-name="P37" text:outline-level="2" text:is-list-header="true"/>
      <text:list text:style-name="L8">
        <text:list-item>
          <text:list>
            <text:list-item>
              <text:h text:style-name="P38" text:outline-level="2">Dst Port (Destination Port)</text:h>
            </text:list-item>
          </text:list>
        </text:list-item>
        <text:list-item>
          <text:p text:style-name="P39">La porta di destinazione del traffico di rete (es. 80 HTTP, 443 HTTPS, 22 SSH).<text:line-break/>È una feature molto importante perché molti attacchi si concentrano su porte specifiche o servizi vulnerabili.</text:p>
          <text:list>
            <text:list-item>
              <text:h text:style-name="P38" text:outline-level="2">Init Fwd Win Byts (Initial Forward Window Bytes)</text:h>
            </text:list-item>
          </text:list>
        </text:list-item>
        <text:list-item>
          <text:p text:style-name="P39">Indica la dimensione iniziale della finestra TCP nella direzione forward.<text:line-break/>Rappresenta la quantità di dati che possono essere inviati prima di ricevere una conferma (ACK). È utile per identificare comportamenti anomali nelle connessioni TCP.</text:p>
          <text:list>
            <text:list-item>
              <text:h text:style-name="P38" text:outline-level="2">Fwd Seg Size Min (Forward Segment Size Minimum)</text:h>
            </text:list-item>
          </text:list>
        </text:list-item>
        <text:list-item>
          <text:p text:style-name="P39">Indica la dimensione minima dei segmenti TCP inviati in direzione forward.<text:line-break/>Può aiutare a individuare traffico frammentato o non standard, spesso associato ad attività sospette.</text:p>
          <text:list>
            <text:list-item>
              <text:h text:style-name="P38" text:outline-level="2"><text:soft-page-break/>FIN Flag Cnt (FIN Flag Count)</text:h>
            </text:list-item>
          </text:list>
        </text:list-item>
        <text:list-item>
          <text:p text:style-name="P39">Conta il numero di pacchetti con flag FIN, utilizzati per terminare una connessione TCP.<text:line-break/>Valori anomali possono indicare chiusure di connessione sospette o non normali.</text:p>
          <text:list>
            <text:list-item>
              <text:h text:style-name="P38" text:outline-level="2">Active Std (Active Standard Deviation)</text:h>
            </text:list-item>
          </text:list>
        </text:list-item>
        <text:list-item>
          <text:p text:style-name="P40">Misura la variabilità del tempo in cui una connessione è attiva.<text:line-break/>Serve a identificare traffico instabile o automatizzato.</text:p>
          <text:list>
            <text:list-item>
              <text:h text:style-name="P41" text:outline-level="2">Bwd Pkts/b Avg (Backward Packets per Byte Average)</text:h>
            </text:list-item>
          </text:list>
        </text:list-item>
        <text:list-item>
          <text:p text:style-name="P39">Rappresenta la media dei pacchetti nella direzione backward rispetto ai byte trasferiti.<text:line-break/>Aiuta a comprendere il comportamento della comunicazione <text:span text:style-name="T31">da </text:span>server <text:span text:style-name="T31">a</text:span> client.</text:p>
          <text:list>
            <text:list-item>
              <text:h text:style-name="P38" text:outline-level="2">Bwd PSH Flags (Backward PSH Flags)</text:h>
            </text:list-item>
          </text:list>
        </text:list-item>
        <text:list-item>
          <text:p text:style-name="P39">Conta i flag PSH (Push) nella direzione backward.<text:line-break/>Questi flag indicano che i dati devono essere immediatamente consegnati all’applicazione.</text:p>
          <text:list>
            <text:list-item>
              <text:h text:style-name="P38" text:outline-level="2">Fwd Blk Rate Avg (Forward Block Rate Average)</text:h>
            </text:list-item>
          </text:list>
        </text:list-item>
        <text:list-item>
          <text:p text:style-name="P39">Indica la velocità media con cui il traffico forward viene bloccato o rallentato.<text:line-break/>Può essere utile per rilevare congestione o attività anomale.</text:p>
          <text:list>
            <text:list-item>
              <text:h text:style-name="P38" text:outline-level="2">Bwd URG Flags (Backward URG Flags)</text:h>
            </text:list-item>
          </text:list>
        </text:list-item>
        <text:list-item>
          <text:p text:style-name="P39">Conta i flag URG (urgent) nel traffico backward.<text:line-break/>Questi flag sono rari nel traffico normale e possono indicare comportamenti sospetti.</text:p>
          <text:list>
            <text:list-item>
              <text:h text:style-name="P38" text:outline-level="2">Fwd Byts/b Avg (Forward Bytes per Burst Average)</text:h>
            </text:list-item>
          </text:list>
        </text:list-item>
        <text:list-item>
          <text:p text:style-name="P39">Indica la quantità media di byte trasmessi per burst nella direzione forward.<text:line-break/>Serve a descrivere la densità del traffico in uscita.</text:p>
        </text:list-item>
      </text:list>
      <text:h text:style-name="P37" text:outline-level="2" text:is-list-header="true">Conclusione</text:h>
      <text:p text:style-name="P42">Il modello si basa principalmente su due feature:</text:p>
      <text:list text:style-name="L9">
        <text:list-item>
          <text:p text:style-name="P43">Dst Port </text:p>
        </text:list-item>
        <text:list-item>
          <text:p text:style-name="P44">Init Fwd Win Byts </text:p>
        </text:list-item>
      </text:list>
      <text:p text:style-name="P42"><text:soft-page-break/>Le altre feature contribuiscono in modo secondario ma aiutano a migliorare la precisione nella rilevazione di traffico anomalo o malevolo.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7:21:20.922996569</meta:creation-date>
    <dc:date>2026-05-11T19:39:22.880653441</dc:date>
    <meta:editing-duration>PT3H11M13S</meta:editing-duration>
    <meta:editing-cycles>27</meta:editing-cycles>
    <meta:generator>LibreOffice/25.8.6.2$Linux_X86_64 LibreOffice_project/580$Build-2</meta:generator>
    <meta:document-statistic meta:table-count="0" meta:image-count="5" meta:object-count="0" meta:page-count="8" meta:paragraph-count="75" meta:word-count="990" meta:character-count="6306" meta:non-whitespace-character-count="5414"/>
  </office:meta>
</office:document-meta>
</file>